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600000036C877DEABB4F96EFB.png" manifest:media-type="image/png"/>
  <manifest:file-entry manifest:full-path="Pictures/10000201000010D000000D905AFB2B36F4509ACD.png" manifest:media-type="image/png"/>
  <manifest:file-entry manifest:full-path="Pictures/10000000000003A1000002115BEC030BE1581323.png" manifest:media-type="image/png"/>
  <manifest:file-entry manifest:full-path="Pictures/10000000000006200000005485B7C065C09E876B.png" manifest:media-type="image/png"/>
  <manifest:file-entry manifest:full-path="Pictures/100000000000022E0000017F99A93DE39CE194F9.png" manifest:media-type="image/png"/>
  <manifest:file-entry manifest:full-path="Pictures/10000000000003C90000030375077FBBF29D47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852a6" officeooo:paragraph-rsid="000852a6" style:font-size-asian="15pt" style:font-size-complex="15pt"/>
    </style:style>
    <style:style style:name="P3" style:family="paragraph" style:parent-style-name="Standard">
      <style:text-properties fo:font-size="15pt" officeooo:rsid="0010527b" officeooo:paragraph-rsid="0010527b" style:font-size-asian="15pt" style:font-size-complex="15pt"/>
    </style:style>
    <style:style style:name="P4" style:family="paragraph" style:parent-style-name="Standard">
      <style:text-properties fo:font-size="15pt" officeooo:paragraph-rsid="0010527b" style:font-size-asian="15pt" style:font-size-complex="15pt"/>
    </style:style>
    <style:style style:name="P5" style:family="paragraph" style:parent-style-name="Standard">
      <style:text-properties fo:color="#800080" loext:opacity="100%" fo:font-size="15pt" fo:font-weight="bold" officeooo:rsid="000852a6" officeooo:paragraph-rsid="000852a6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800080" loext:opacity="100%" fo:font-size="15pt" fo:font-weight="bold" officeooo:rsid="000852a6" officeooo:paragraph-rsid="0009aa3c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800080" loext:opacity="100%" fo:font-size="15pt" fo:font-weight="bold" officeooo:rsid="000e2bdf" officeooo:paragraph-rsid="000e2bdf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800080" loext:opacity="100%" fo:font-size="15pt" fo:font-weight="bold" officeooo:rsid="000e9a53" officeooo:paragraph-rsid="000e2bdf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2a6099" loext:opacity="100%" fo:font-size="15pt" fo:font-weight="bold" officeooo:rsid="000852a6" officeooo:paragraph-rsid="000852a6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2a6099" loext:opacity="100%" fo:font-size="15pt" fo:font-weight="bold" officeooo:rsid="000852a6" officeooo:paragraph-rsid="000ab941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2a6099" loext:opacity="100%" fo:font-size="15pt" fo:font-weight="bold" officeooo:rsid="000c4d3e" officeooo:paragraph-rsid="000c4d3e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2a6099" loext:opacity="100%" fo:font-size="15pt" fo:font-weight="bold" officeooo:rsid="000e2bdf" officeooo:paragraph-rsid="000e2bdf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ff0000" loext:opacity="100%" fo:font-size="15pt" fo:font-weight="bold" officeooo:rsid="000852a6" officeooo:paragraph-rsid="000852a6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0000" loext:opacity="100%" fo:font-size="15pt" style:font-size-asian="15pt" style:font-size-complex="15pt"/>
    </style:style>
    <style:style style:name="P15" style:family="paragraph" style:parent-style-name="Standard">
      <style:text-properties fo:color="#000000" loext:opacity="100%" fo:font-size="15pt" officeooo:paragraph-rsid="000852a6" style:font-size-asian="15pt" style:font-size-complex="15pt"/>
    </style:style>
    <style:style style:name="P16" style:family="paragraph" style:parent-style-name="Standard">
      <style:text-properties fo:color="#000000" loext:opacity="100%" fo:font-size="15pt" officeooo:rsid="000852a6" officeooo:paragraph-rsid="000852a6" style:font-size-asian="15pt" style:font-size-complex="15pt"/>
    </style:style>
    <style:style style:name="P17" style:family="paragraph" style:parent-style-name="Standard">
      <style:text-properties fo:color="#000000" loext:opacity="100%" fo:font-size="15pt" fo:font-weight="bold" officeooo:rsid="0009aa3c" officeooo:paragraph-rsid="0009aa3c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loext:opacity="100%" fo:font-size="15pt" fo:font-weight="bold" officeooo:rsid="000e2bdf" officeooo:paragraph-rsid="000e2bdf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000000" loext:opacity="100%" fo:font-size="12pt" fo:font-weight="bold" officeooo:rsid="000e2bdf" officeooo:paragraph-rsid="000e2bdf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fo:font-size="12pt" fo:font-weight="normal" officeooo:rsid="000e2bdf" officeooo:paragraph-rsid="000e2bdf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a933" loext:opacity="100%" fo:font-size="15pt" fo:font-weight="bold" officeooo:rsid="0009aa3c" officeooo:paragraph-rsid="0009aa3c" style:font-size-asian="15pt" style:font-weight-asian="bold" style:font-size-complex="15pt" style:font-weight-complex="bold"/>
    </style:style>
    <style:style style:name="P22" style:family="paragraph" style:parent-style-name="Standard">
      <style:text-properties officeooo:paragraph-rsid="000e2bdf"/>
    </style:style>
    <style:style style:name="P23" style:family="paragraph" style:parent-style-name="Standard">
      <style:text-properties fo:font-size="13pt" officeooo:rsid="0010527b" officeooo:paragraph-rsid="0010527b" style:font-size-asian="13pt" style:font-size-complex="13pt"/>
    </style:style>
    <style:style style:name="P24" style:family="paragraph" style:parent-style-name="Standard">
      <style:text-properties officeooo:paragraph-rsid="000e9a53"/>
    </style:style>
    <style:style style:name="P25" style:family="paragraph" style:parent-style-name="Standard">
      <style:text-properties fo:color="#000000" loext:opacity="100%" fo:font-size="15pt" fo:font-weight="bold" officeooo:rsid="0009aa3c" officeooo:paragraph-rsid="0009aa3c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800080" loext:opacity="100%" fo:font-size="15pt" fo:font-weight="bold" officeooo:rsid="000852a6" officeooo:paragraph-rsid="00137fc6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2a6099" loext:opacity="100%" fo:font-size="15pt" fo:font-weight="bold" officeooo:rsid="0009aa3c" officeooo:paragraph-rsid="00137fc6" style:font-size-asian="15pt" style:font-weight-asian="bold" style:font-size-complex="15pt" style:font-weight-complex="bold"/>
    </style:style>
    <style:style style:name="T1" style:family="text">
      <style:text-properties officeooo:rsid="000852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a6099" loext:opacity="100%"/>
    </style:style>
    <style:style style:name="T4" style:family="text">
      <style:text-properties officeooo:rsid="000ab941"/>
    </style:style>
    <style:style style:name="T5" style:family="text">
      <style:text-properties fo:color="#800080" loext:opacity="100%" officeooo:rsid="000ab941"/>
    </style:style>
    <style:style style:name="T6" style:family="text">
      <style:text-properties fo:color="#800080" loext:opacity="100%" fo:font-size="15pt" fo:font-weight="bold" officeooo:rsid="000e2bdf" style:font-size-asian="15pt" style:font-weight-asian="bold" style:font-size-complex="15pt" style:font-weight-complex="bold"/>
    </style:style>
    <style:style style:name="T7" style:family="text">
      <style:text-properties fo:color="#800080" loext:opacity="100%" fo:font-size="15pt" fo:font-weight="bold" officeooo:rsid="000e9a53" style:font-size-asian="15pt" style:font-weight-asian="bold" style:font-size-complex="15pt" style:font-weight-complex="bold"/>
    </style:style>
    <style:style style:name="T8" style:family="text">
      <style:text-properties fo:color="#800080" loext:opacity="100%" fo:font-size="15pt" fo:font-weight="bold" officeooo:rsid="00137fc6" style:font-size-asian="15pt" style:font-weight-asian="bold" style:font-size-complex="15pt" style:font-weight-complex="bold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officeooo:rsid="000ab941"/>
    </style:style>
    <style:style style:name="T11" style:family="text">
      <style:text-properties fo:color="#00a933" loext:opacity="100%" officeooo:rsid="0012fa7c"/>
    </style:style>
    <style:style style:name="T12" style:family="text">
      <style:text-properties officeooo:rsid="000e2bdf"/>
    </style:style>
    <style:style style:name="T13" style:family="text">
      <style:text-properties officeooo:rsid="000e9a53"/>
    </style:style>
    <style:style style:name="T14" style:family="text">
      <style:text-properties officeooo:rsid="0011b630"/>
    </style:style>
    <style:style style:name="T15" style:family="text">
      <style:text-properties officeooo:rsid="00137fc6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o install mods Copy and paste this whole filepath <text:span text:style-name="T10">into the </text:span><text:span text:style-name="T11">File Explorer </text:span><text:span text:style-name="T10">searchbar</text:span><text:span text:style-name="T4"> </text:span>to find the correct folder:</text:p>
      <text:p text:style-name="P27">C:\Program Files (x86)\Steam\steamapps\common\Mount &amp; Blade II Bannerl<text:span text:style-name="T1">o</text:span>rd\M<text:span text:style-name="T1">o</text:span>dules</text:p>
      <text:p text:style-name="P17"/>
      <text:p text:style-name="P17"/>
      <text:p text:style-name="P17"/>
      <text:p text:style-name="P17"><text:span text:style-name="T17">I know some of you have an IQ of only 72.</text:span> <text:s/></text:p>
      <text:p text:style-name="P17">I promise!! <text:s/><text:span text:style-name="T12">I</text:span>nstalling mods for Mount &amp; Blade Bannerlord is easy!</text:p>
      <text:p text:style-name="P17">You only need to <text:span text:style-name="T9">learn how to use Microsoft File Explorer</text:span>:</text:p>
      <text:p text:style-name="P21"/>
      <text:p text:style-name="P6"><draw:frame draw:style-name="fr1" draw:name="Image1" text:anchor-type="char" svg:width="6.9252in" svg:height="5.5862in" draw:z-index="0"><draw:image xlink:href="Pictures/10000201000010D000000D905AFB2B36F4509ACD.png" xlink:type="simple" xlink:show="embed" xlink:actuate="onLoad" draw:mime-type="image/png"/></draw:frame></text:p>
      <text:p text:style-name="P5">To install mods</text:p>
      <text:p text:style-name="P5">Copy and paste this whole filepath <text:span text:style-name="T10">into the </text:span><text:span text:style-name="T11">File Explorer </text:span><text:span text:style-name="T10">searchbar</text:span><text:span text:style-name="T4"> </text:span>to find the correct folder:</text:p>
      <text:p text:style-name="P5"/>
      <text:p text:style-name="P14"><text:soft-page-break/>C:\Program Files (x86)\Steam\steamapps\common\Mount &amp; Blade II Bannerl<text:span text:style-name="T1">o</text:span>rd\M<text:span text:style-name="T1">o</text:span>dules</text:p>
      <text:p text:style-name="P1"><draw:frame draw:style-name="fr3" draw:name="Image2" text:anchor-type="char" svg:width="6.9252in" svg:height="0.3709in" draw:z-index="1"><draw:image xlink:href="Pictures/10000000000006200000005485B7C065C09E876B.png" xlink:type="simple" xlink:show="embed" xlink:actuate="onLoad" draw:mime-type="image/png"/></draw:frame></text:p>
      <text:p text:style-name="P3">Let’s <text:s/>PRACTICE installing your very first mod:</text:p>
      <text:p text:style-name="P23"><text:a xlink:type="simple" xlink:href="https://www.nexusmods.com/mountandblade2bannerlord/mods/10426?tab=videos" text:style-name="Internet_20_link" text:visited-style-name="Visited_20_Internet_20_Link">https://www.nexusmods.com/mountandblade2bannerlord/mods/10426?tab=videos</text:a></text:p>
      <text:p text:style-name="P4"/>
      <text:p text:style-name="P9">To install Bannerlord Software Extender </text:p>
      <text:p text:style-name="P10">Copy and paste this filepath <text:span text:style-name="T10">into the searchbar</text:span><text:span text:style-name="T5"> </text:span>to find the correct folder:</text:p>
      <text:p text:style-name="P9"/>
      <text:p text:style-name="P14">C:\Program Files (x86)\Steam\steamapps\common\Mount &amp; Blade II Bannerl<text:span text:style-name="T1">o</text:span>rd\Bin\Win64_Shipping_Cli<text:span text:style-name="T1">e</text:span>nt</text:p>
      <text:p text:style-name="P14"/>
      <text:p text:style-name="P14"><draw:frame draw:style-name="fr3" draw:name="Image3" text:anchor-type="char" svg:width="6.9252in" svg:height="0.4071in" draw:z-index="2"><draw:image xlink:href="Pictures/100000000000039600000036C877DEABB4F96EFB.png" xlink:type="simple" xlink:show="embed" xlink:actuate="onLoad" draw:mime-type="image/png"/></draw:frame></text:p>
      <text:p text:style-name="P1"/>
      <text:p text:style-name="P13">In the <text:span text:style-name="T3">Win64_Shipping_Client</text:span> folder you just found Copy and paste <text:span text:style-name="T2">only</text:span> these items from the Bannerlord Software Extender zip file:</text:p>
      <text:p text:style-name="P15">Bannerlord.BLSE.AppDomainManager.dll </text:p>
      <text:p text:style-name="P15">Bannerlord.BLSE.Launcher.exe </text:p>
      <text:p text:style-name="P15">Bannerlord.BLSE.Launcher.exe.config </text:p>
      <text:p text:style-name="P15">Bannerlord.BLSE.LauncherEx.exe <text:s/></text:p>
      <text:p text:style-name="P15">Bannerlord.BLSE.LauncherEx.exe.config <text:s/></text:p>
      <text:p text:style-name="P15">Bannerlord.BLSE.Shared.dll <text:s/></text:p>
      <text:p text:style-name="P15">Bannerlord.BLSE.Standalone.exe <text:s/></text:p>
      <text:p text:style-name="P15">Bannerlord.BLSE.Standalone.exe.config <text:s/></text:p>
      <text:p text:style-name="P16">TaleWorlds.MountAndBlade.Launcher.exe.config</text:p>
      <text:p text:style-name="P16"><draw:frame draw:style-name="fr2" draw:name="Image4" text:anchor-type="char" svg:x="0.3217in" svg:y="0.2902in" svg:width="5.8134in" svg:height="3.9898in" draw:z-index="3"><draw:image xlink:href="Pictures/100000000000022E0000017F99A93DE39CE194F9.png" xlink:type="simple" xlink:show="embed" xlink:actuate="onLoad" draw:mime-type="image/png"/></draw:frame><text:soft-page-break/></text:p>
      <text:p text:style-name="P16"/>
      <text:p text:style-name="P16"/>
      <text:p text:style-name="P16">Do <text:span text:style-name="T2">NOT</text:span> drag and drop the entire Bin folder <text:s/>or <text:s text:c="2"/>Win64_Shipping_Client folder you see!! <text:s/></text:p>
      <text:p text:style-name="P16"/>
      <text:p text:style-name="P16">Do NOT overwrite folders that already exist in your copy of Bannerlord or you will break your game!!</text:p>
      <text:p text:style-name="P2"/>
      <text:p text:style-name="P2"/>
      <text:p text:style-name="P11">Create a shortcut for BLSE launcher on your desktop</text:p>
      <text:p text:style-name="P11"/>
      <text:p text:style-name="P11"><draw:frame draw:style-name="fr1" draw:name="Image5" text:anchor-type="char" svg:width="6.9252in" svg:height="5.5091in" draw:z-index="4"><draw:image xlink:href="Pictures/10000000000003C90000030375077FBBF29D4744.png" xlink:type="simple" xlink:show="embed" xlink:actuate="onLoad" draw:mime-type="image/png"/></draw:frame><text:soft-page-break/></text:p>
      <text:p text:style-name="P11">Use the version of BLSE Launcher that is <text:span text:style-name="T2">369 KB</text:span> because it is the most advanced Bannerlord launcher and will allow you to save or import mod <text:s/>your load order for convenience!</text:p>
      <text:p text:style-name="P11"/>
      <text:p text:style-name="P11"/>
      <text:p text:style-name="P11"/>
      <text:p text:style-name="P12">Here’s what the software extender launcher looks like:</text:p>
      <text:p text:style-name="P12"/>
      <text:p text:style-name="P12"><draw:frame draw:style-name="fr1" draw:name="Image6" text:anchor-type="char" svg:width="6.9252in" svg:height="3.9429in" draw:z-index="5"><draw:image xlink:href="Pictures/10000000000003A1000002115BEC030BE1581323.png" xlink:type="simple" xlink:show="embed" xlink:actuate="onLoad" draw:mime-type="image/png"/></draw:frame><text:soft-page-break/></text:p>
      <text:p text:style-name="P12">I’m going to send you a copy of my mod load order for you to import to make things easier for you.</text:p>
      <text:p text:style-name="P12"/>
      <text:p text:style-name="P12"/>
      <text:p text:style-name="P18">Last but most important:</text:p>
      <text:p text:style-name="P7">You must install Unblock DLLs downloade<text:span text:style-name="T13">d</text:span> from Nexus Mods</text:p>
      <text:p text:style-name="P19"/>
      <text:p text:style-name="P20"><text:a xlink:type="simple" xlink:href="https://www.nexusmods.com/mountandblade2bannerlord/mods/397?tab=files" text:style-name="Internet_20_link" text:visited-style-name="Visited_20_Internet_20_Link">https://www.nexusmods.com/mountandblade2bannerlord/mods/397?tab=files</text:a></text:p>
      <text:p text:style-name="P20"/>
      <text:p text:style-name="P22"><text:span text:style-name="T6">I would </text:span><text:span text:style-name="T7">just copy and paste the 2 </text:span><text:span text:style-name="T6"><text:s/></text:span><text:span text:style-name="T7">items you downloaded into this directory:</text:span></text:p>
      <text:p text:style-name="P8"/>
      <text:p text:style-name="P7">C:\Program Files (x86)\Steam\steamapps\common\Mount &amp; Blade II Bannerlord<text:span text:style-name="T14">\Modules</text:span></text:p>
      <text:p text:style-name="P7"/>
      <text:p text:style-name="P24"><text:span text:style-name="T7">Would be easi</text:span><text:span text:style-name="T8">e</text:span><text:span text:style-name="T7">st to </text:span><text:span text:style-name="T8">save the Bannerlord Software Extender Load order file I send you to your Desktop wallpaper</text:span><text:span text:style-name="T7">.</text:span></text:p>
      <text:p text:style-name="P20"/>
      <text:p text:style-name="P12"/>
      <text:p text:style-name="P12"/>
      <text:p text:style-name="P12"/>
      <text:p text:style-name="P12"/>
      <text:p text:style-name="P12"/>
      <text:p text:style-name="P1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9T21:07:03.583000000</meta:creation-date>
    <dc:date>2026-05-31T17:54:33.127000000</dc:date>
    <meta:editing-duration>PT5H30M44S</meta:editing-duration>
    <meta:editing-cycles>7</meta:editing-cycles>
    <meta:generator>LibreOffice/7.0.1.2$Windows_X86_64 LibreOffice_project/7cbcfc562f6eb6708b5ff7d7397325de9e764452</meta:generator>
    <meta:document-statistic meta:table-count="0" meta:image-count="6" meta:object-count="0" meta:page-count="6" meta:paragraph-count="35" meta:word-count="304" meta:character-count="2312" meta:non-whitespace-character-count="2018"/>
  </office:meta>
</office:document-meta>
</file>